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rsid="000a39b0" officeooo:paragraph-rsid="000a39b0"/>
    </style:style>
    <style:style style:name="P2" style:family="paragraph" style:parent-style-name="Standard" style:list-style-name="L1">
      <style:text-properties officeooo:paragraph-rsid="000a39b0"/>
    </style:style>
    <style:style style:name="P3" style:family="paragraph" style:parent-style-name="Standard" style:list-style-name="L2">
      <style:text-properties officeooo:paragraph-rsid="000a39b0"/>
    </style:style>
    <style:style style:name="P4" style:family="paragraph" style:parent-style-name="Standard">
      <style:text-properties fo:font-weight="bold" officeooo:paragraph-rsid="000a39b0" style:font-weight-asian="bold" style:font-weight-complex="bold"/>
    </style:style>
    <style:style style:name="P5" style:family="paragraph" style:parent-style-name="Standard" style:list-style-name="L1">
      <style:text-properties officeooo:rsid="000aca6a" officeooo:paragraph-rsid="000aca6a"/>
    </style:style>
    <style:style style:name="P6" style:family="paragraph" style:parent-style-name="Standard">
      <style:text-properties officeooo:rsid="000aca6a" officeooo:paragraph-rsid="000aca6a"/>
    </style:style>
    <style:style style:name="P7" style:family="paragraph" style:parent-style-name="Standard">
      <style:text-properties officeooo:paragraph-rsid="000c92a4"/>
    </style:style>
    <style:style style:name="P8" style:family="paragraph" style:parent-style-name="Standard">
      <style:text-properties officeooo:rsid="000c92a4" officeooo:paragraph-rsid="000c92a4"/>
    </style:style>
    <style:style style:name="P9" style:family="paragraph" style:parent-style-name="Standard">
      <style:text-properties officeooo:paragraph-rsid="000cfa2e"/>
    </style:style>
    <style:style style:name="T1" style:family="text">
      <style:text-properties officeooo:rsid="000a39b0"/>
    </style:style>
    <style:style style:name="T2" style:family="text">
      <style:text-properties officeooo:rsid="000c92a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roducts Model</text:span></text:p>
      <text:list text:style-name="L2">
        <text:list-item>
          <text:p text:style-name="P3"><text:span text:style-name="T1">Name</text:span></text:p>
        </text:list-item>
      </text:list>
      <text:list text:style-name="L1">
        <text:list-item>
          <text:p text:style-name="P2"><text:span text:style-name="T1">Category [Cakes, Cookies, Cupcakes, Chocolate, Bread, Special Products]</text:span></text:p>
        </text:list-item>
        <text:list-item>
          <text:p text:style-name="P1">Type [Variable, Simple] </text:p>
          <text:p text:style-name="P1">I.e variable products are of different sizes, quantity while simple are fixed for example a cake can be 2kgs, 5kgs…</text:p>
        </text:list-item>
        <text:list-item>
          <text:p text:style-name="P1">Initial Price </text:p>
          <text:p text:style-name="P1">(this will help to show that products are on off and it should be canceled on the frontend its usually greater than price, make it option it can be blank and not displayed on frontend but once admin updates it should show on frontend but canceled) </text:p>
        </text:list-item>
        <text:list-item>
          <text:p text:style-name="P2"><text:span text:style-name="T1">Price</text:span></text:p>
        </text:list-item>
        <text:list-item>
          <text:p text:style-name="P1">Description</text:p>
        </text:list-item>
        <text:list-item>
          <text:p text:style-name="P1">Image</text:p>
        </text:list-item>
        <text:list-item>
          <text:p text:style-name="P5">Slug</text:p>
          <text:p text:style-name="P5">For example if a product name is Vanilla Cake its slug will be: vanilla-cake this will help in urls to trace a specific product I.e <text:a xlink:type="simple" xlink:href="https://rmeksbakery.co.ke/cakes(category)/vanilla-cake(slug)/" text:style-name="Internet_20_link" text:visited-style-name="Visited_20_Internet_20_Link">https://rmeksbakery.co.ke/cakes(category)/vanilla-cake(slug)/</text:a></text:p>
        </text:list-item>
      </text:list>
      <text:p text:style-name="P6"/>
      <text:p text:style-name="P6"/>
      <text:p text:style-name="P9"><text:tab/><text:tab/></text:p>
      <text:p text:style-name="P9"><text:span text:style-name="T1">Type [Variable, Simple] </text:span></text:p>
      <text:p text:style-name="P7"><text:span text:style-name="T1">I.e variable products are of different sizes, quantity while simple are fixed for example a cake can be 2kgs, 5kgs…</text:span></text:p>
      <text:p text:style-name="P7"/>
      <text:p text:style-name="P7"><text:span text:style-name="T2">functionality: Add a variable product in the admin panel then in products-options model add its options with their respective prices</text:span></text:p>
      <text:p text:style-name="P7"><text:span text:style-name="T2">for example: I add a variable product Vanilla Cake and update its price as: KES 3,000, this price will represent the price of the product with the lowest price under vanilla cakes</text:span></text:p>
      <text:p text:style-name="P8">Therefore Options for Vanilla Cakes can be, Vanilla Cake 2kgs KES 3,000, Vanilla Cake 3kgs KES 4,200, Vanilla Cakes 4kgs KES 5,300, Vanilla Cake 5kgs KES 6,400.</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15:34:49.143828337</meta:creation-date>
    <dc:date>2026-04-13T13:22:04.223266067</dc:date>
    <meta:editing-duration>PT3H33M8S</meta:editing-duration>
    <meta:editing-cycles>1</meta:editing-cycles>
    <meta:document-statistic meta:table-count="0" meta:image-count="0" meta:object-count="0" meta:page-count="1" meta:paragraph-count="18" meta:word-count="225" meta:character-count="1331" meta:non-whitespace-character-count="1128"/>
    <meta:generator>LibreOffice/24.2.7.2$Linux_X86_64 LibreOffice_project/420$Build-2</meta:generator>
  </office:meta>
</office:document-meta>
</file>